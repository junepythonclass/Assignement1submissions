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PreformattedText" style:family="paragraph">
      <style:paragraph-properties fo:margin-bottom="0.1965in"/>
    </style:style>
    <style:style style:name="P7" style:parent-style-name="PreformattedText" style:family="paragraph">
      <style:paragraph-properties fo:margin-bottom="0.1965in"/>
    </style:style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PreformattedText" style:family="paragraph">
      <style:paragraph-properties fo:margin-bottom="0.1965in"/>
    </style:style>
    <style:style style:name="P18" style:parent-style-name="PreformattedText" style:family="paragraph">
      <style:paragraph-properties fo:margin-bottom="0.1965in"/>
    </style:style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PreformattedText" style:family="paragraph">
      <style:paragraph-properties fo:margin-bottom="0.1965in"/>
    </style:style>
    <style:style style:name="P26" style:parent-style-name="PreformattedText" style:family="paragraph">
      <style:paragraph-properties fo:margin-bottom="0.1965in"/>
    </style:style>
    <style:style style:name="P27" style:parent-style-name="Textbody" style:family="paragraph"/>
    <style:style style:name="P28" style:parent-style-name="Textbody" style:family="paragraph"/>
    <style:style style:name="P29" style:parent-style-name="PreformattedText" style:family="paragraph">
      <style:paragraph-properties fo:margin-bottom="0.1965in"/>
    </style:style>
    <style:style style:name="P30" style:parent-style-name="PreformattedText" style:family="paragraph">
      <style:paragraph-properties fo:margin-bottom="0.1965in"/>
    </style:style>
    <style:style style:name="P31" style:parent-style-name="PreformattedText" style:family="paragraph">
      <style:paragraph-properties fo:margin-bottom="0.1965in"/>
    </style:style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PreformattedText" style:family="paragraph">
      <style:paragraph-properties fo:margin-bottom="0.1965in"/>
    </style:style>
    <style:style style:name="P37" style:parent-style-name="PreformattedText" style:family="paragraph">
      <style:paragraph-properties fo:margin-bottom="0.1965in"/>
    </style:style>
    <style:style style:name="P38" style:parent-style-name="PreformattedText" style:family="paragraph">
      <style:paragraph-properties fo:margin-bottom="0.1965in"/>
    </style:style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PreformattedText" style:family="paragraph">
      <style:paragraph-properties fo:margin-bottom="0.1965in"/>
    </style:style>
    <style:style style:name="P44" style:parent-style-name="PreformattedText" style:family="paragraph">
      <style:paragraph-properties fo:margin-bottom="0.1965in"/>
    </style:style>
    <style:style style:name="P45" style:parent-style-name="PreformattedText" style:family="paragraph">
      <style:paragraph-properties fo:margin-bottom="0.1965in"/>
    </style:style>
    <style:style style:name="P46" style:parent-style-name="PreformattedText" style:family="paragraph">
      <style:paragraph-properties fo:margin-bottom="0.1965in"/>
    </style:style>
    <style:style style:name="TableColumn48" style:family="table-column">
      <style:table-column-properties style:column-width="1.4868in" style:use-optimal-column-width="false"/>
    </style:style>
    <style:style style:name="TableColumn49" style:family="table-column">
      <style:table-column-properties style:column-width="2.559in" style:use-optimal-column-width="false"/>
    </style:style>
    <style:style style:name="Table47" style:family="table">
      <style:table-properties style:width="4.0458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" style:family="table-cell">
      <style:table-cell-properties fo:border="none" style:writing-mode="lr-tb" style:vertical-align="middle" fo:padding-top="0.0194in" fo:padding-left="0.0194in" fo:padding-bottom="0.0194in" fo:padding-right="0.0194in"/>
    </style:style>
  </office:automatic-styles>
  <office:body>
    <office:text text:use-soft-page-breaks="true">
      <text:p text:style-name="P1"/>
      <text:h text:style-name="Heading1" text:outline-level="1">1. Programming</text:h>
      <text:h text:style-name="Heading3" text:outline-level="3">Simple Definition</text:h>
      <text:p text:style-name="Textbody">Programming is the process of giving instructions to a computer so it can perform tasks.</text:p>
      <text:h text:style-name="Heading3" text:outline-level="3">Boda Boda Analogy</text:h>
      <text:p text:style-name="Textbody">A passenger tells you:</text:p>
      <text:list text:style-name="LFO1" text:continue-numbering="true">
        <text:list-item>
          <text:p text:style-name="P2">Start the bike</text:p>
        </text:list-item>
        <text:list-item>
          <text:p text:style-name="P3">Go to<text:s/>the market</text:p>
        </text:list-item>
        <text:list-item>
          <text:p text:style-name="P4">Turn left</text:p>
        </text:list-item>
        <text:list-item>
          <text:p text:style-name="P5">Stop at the gate</text:p>
        </text:list-item>
      </text:list>
      <text:p text:style-name="Textbody">These instructions tell you exactly what to do.</text:p>
      <text:p text:style-name="Textbody">Programming is like giving instructions to a computer instead of a rider.</text:p>
      <text:h text:style-name="Heading3" text:outline-level="3">Computer Example</text:h>
      <text:p text:style-name="P6"><text:span text:style-name="SourceText">print("Hello")</text:span></text:p>
      <text:p text:style-name="Textbody">The computer follows the instruction and displays:</text:p>
      <text:p text:style-name="P7"><text:span text:style-name="SourceText">Hello</text:span></text:p>
      <text:p text:style-name="HorizontalLine"/>
      <text:h text:style-name="Heading1" text:outline-level="1">2. Relationship Between CPU, RAM, and Hard Disk</text:h>
      <text:h text:style-name="Heading3" text:outline-level="3">Simple Definition</text:h>
      <text:list text:style-name="LFO2" text:continue-numbering="true">
        <text:list-item>
          <text:p text:style-name="P8"><text:span text:style-name="StrongEmphasis">CPU</text:span><text:s/>= the brain that does the work.</text:p>
        </text:list-item>
        <text:list-item>
          <text:p text:style-name="P9"><text:span text:style-name="StrongEmphasis">RAM</text:span><text:s/>= temporary working space.</text:p>
        </text:list-item>
        <text:list-item>
          <text:p text:style-name="P10"><text:span text:style-name="StrongEmphasis">Hard Disk</text:span><text:s/>= long-term storage.</text:p>
        </text:list-item>
      </text:list>
      <text:p text:style-name="Textbody">They work together.</text:p>
      <text:h text:style-name="Heading3" text:outline-level="3">Boda Boda Analogy</text:h>
      <text:p text:style-name="Textbody">Imagine:</text:p>
      <text:list text:style-name="LFO3" text:continue-numbering="true">
        <text:list-item>
          <text:p text:style-name="P11"><text:span text:style-name="StrongEmphasis">CPU</text:span><text:s/>= the rider.</text:p>
        </text:list-item>
        <text:list-item>
          <text:p text:style-name="P12"><text:span text:style-name="StrongEmphasis">RAM</text:span><text:s/>= the motorcycle seat or carrier where things are temporarily kept while riding.</text:p>
        </text:list-item>
        <text:list-item>
          <text:p text:style-name="P13"><text:span text:style-name="StrongEmphasis">Hard Disk</text:span><text:s/>=<text:s/>your home/store where you keep items permanently.</text:p>
        </text:list-item>
      </text:list>
      <text:p text:style-name="Textbody">Example:</text:p>
      <text:soft-page-break/>
      <text:p text:style-name="Textbody">You keep your helmet at home (Hard Disk).</text:p>
      <text:p text:style-name="Textbody">Before riding, you take it and put it on your bike (RAM).</text:p>
      <text:p text:style-name="Textbody">You then use it while riding (CPU working).</text:p>
      <text:h text:style-name="Heading3" text:outline-level="3">Computer Example</text:h>
      <text:p text:style-name="Textbody">When you open a photo:</text:p>
      <text:list text:style-name="LFO4" text:continue-numbering="true">
        <text:list-item>
          <text:p text:style-name="P14">Photo stored<text:s/>on Hard Disk.</text:p>
        </text:list-item>
        <text:list-item>
          <text:p text:style-name="P15">Photo loaded into RAM.</text:p>
        </text:list-item>
        <text:list-item>
          <text:p text:style-name="P16">CPU processes and displays it.</text:p>
        </text:list-item>
      </text:list>
      <text:p text:style-name="HorizontalLine"/>
      <text:h text:style-name="Heading1" text:outline-level="1">3. Memory Address</text:h>
      <text:h text:style-name="Heading3" text:outline-level="3">Simple Definition</text:h>
      <text:p text:style-name="Textbody">A memory address is the location where data is stored in RAM.</text:p>
      <text:h text:style-name="Heading3" text:outline-level="3">Boda Boda Analogy</text:h>
      <text:p text:style-name="Textbody">Every house has an address.</text:p>
      <text:p text:style-name="Textbody">Example:</text:p>
      <text:p text:style-name="P17"><text:span text:style-name="SourceText">Plot 25, Main Street</text:span></text:p>
      <text:p text:style-name="Textbody">If someone<text:s/>wants to deliver a package, they use that address.</text:p>
      <text:p text:style-name="Textbody">RAM works the same way.</text:p>
      <text:p text:style-name="Textbody">Every piece of data has an address.</text:p>
      <text:h text:style-name="Heading3" text:outline-level="3">Computer Example</text:h>
      <text:p text:style-name="Textbody">If a variable stores:</text:p>
      <text:p text:style-name="P18"><text:span text:style-name="SourceText">age = 20</text:span></text:p>
      <text:p text:style-name="Textbody">The number 20 is stored somewhere in memory.</text:p>
      <text:p text:style-name="Textbody">That location has a memory address.</text:p>
      <text:p text:style-name="HorizontalLine"/>
      <text:h text:style-name="Heading1" text:outline-level="1">4. Memory Partitioning</text:h>
      <text:h text:style-name="Heading3" text:outline-level="3">Simple Definition</text:h>
      <text:p text:style-name="Textbody">Memory partitioning means dividing memory into sections so different programs can use it.</text:p>
      <text:h text:style-name="Heading3" text:outline-level="3">Boda Boda Analogy</text:h>
      <text:p text:style-name="Textbody">Imagine a parking yard.</text:p>
      <text:p text:style-name="Textbody">You divide it into spaces:</text:p>
      <text:soft-page-break/>
      <text:list text:style-name="LFO5" text:continue-numbering="true">
        <text:list-item>
          <text:p text:style-name="P19">Space A → Bikes</text:p>
        </text:list-item>
        <text:list-item>
          <text:p text:style-name="P20">Space B → Cars</text:p>
        </text:list-item>
        <text:list-item>
          <text:p text:style-name="P21">Space C → Trucks</text:p>
        </text:list-item>
      </text:list>
      <text:p text:style-name="Textbody">Everyone has their own<text:s/>area.</text:p>
      <text:h text:style-name="Heading3" text:outline-level="3">Computer Example</text:h>
      <text:p text:style-name="Textbody">RAM may be divided so:</text:p>
      <text:list text:style-name="LFO6" text:continue-numbering="true">
        <text:list-item>
          <text:p text:style-name="P22">Browser uses one part</text:p>
        </text:list-item>
        <text:list-item>
          <text:p text:style-name="P23">Music player uses another</text:p>
        </text:list-item>
        <text:list-item>
          <text:p text:style-name="P24">Game uses another</text:p>
        </text:list-item>
      </text:list>
      <text:p text:style-name="Textbody">This prevents confusion.</text:p>
      <text:p text:style-name="HorizontalLine"/>
      <text:h text:style-name="Heading1" text:outline-level="1">5. Variables (Memory Variables)</text:h>
      <text:h text:style-name="Heading3" text:outline-level="3">Simple Definition</text:h>
      <text:p text:style-name="Textbody">A variable is a named container that stores data.</text:p>
      <text:h text:style-name="Heading3" text:outline-level="3">Boda Boda Analogy</text:h>
      <text:p text:style-name="Textbody">Suppose you have a fuel container labeled:</text:p>
      <text:p text:style-name="P25"><text:span text:style-name="SourceText">Fuel</text:span></text:p>
      <text:p text:style-name="Textbody">Inside it is petrol.</text:p>
      <text:p text:style-name="Textbody">The label helps you know what is inside.</text:p>
      <text:h text:style-name="Heading3" text:outline-level="3">Computer Example</text:h>
      <text:p text:style-name="P26"><text:span text:style-name="SourceText">name = "Musab"</text:span></text:p>
      <text:list text:style-name="LFO7" text:continue-numbering="true">
        <text:list-item>
          <text:p text:style-name="P27">Variable name =<text:s/><text:span text:style-name="SourceText">name</text:span></text:p>
        </text:list-item>
        <text:list-item>
          <text:p text:style-name="P28">Stored value =<text:s/><text:span text:style-name="SourceText">"Musab"</text:span></text:p>
        </text:list-item>
      </text:list>
      <text:p text:style-name="HorizontalLine"/>
      <text:h text:style-name="Heading1" text:outline-level="1">6. Statement</text:h>
      <text:h text:style-name="Heading3" text:outline-level="3">Simple Definition</text:h>
      <text:p text:style-name="Textbody">A statement is a single instruction given to a computer.</text:p>
      <text:h text:style-name="Heading3" text:outline-level="3">Boda Boda Analogy</text:h>
      <text:p text:style-name="Textbody">A passenger says:</text:p>
      <text:p text:style-name="P29"><text:span text:style-name="SourceText">Stop here.</text:span></text:p>
      <text:soft-page-break/>
      <text:p text:style-name="Textbody">That is one instruction.</text:p>
      <text:h text:style-name="Heading3" text:outline-level="3">Computer Example</text:h>
      <text:p text:style-name="P30"><text:span text:style-name="SourceText">print("Good morning")</text:span></text:p>
      <text:p text:style-name="Textbody">This is one statement.</text:p>
      <text:p text:style-name="HorizontalLine"/>
      <text:h text:style-name="Heading1" text:outline-level="1">7. Module</text:h>
      <text:h text:style-name="Heading3" text:outline-level="3">Simple Definition</text:h>
      <text:p text:style-name="Textbody">A module is a file containing reusable code.</text:p>
      <text:h text:style-name="Heading3" text:outline-level="3">Boda Boda Analogy</text:h>
      <text:p text:style-name="Textbody">Imagine a<text:s/>toolbox.</text:p>
      <text:p text:style-name="Textbody">Instead of carrying every tool separately, you carry one toolbox containing many useful tools.</text:p>
      <text:h text:style-name="Heading3" text:outline-level="3">Computer Example</text:h>
      <text:p text:style-name="Textbody">Python's math module:</text:p>
      <text:p text:style-name="P31"><text:span text:style-name="SourceText">import math</text:span></text:p>
      <text:p text:style-name="Textbody">Now you can use many math functions.</text:p>
      <text:p text:style-name="HorizontalLine"/>
      <text:h text:style-name="Heading1" text:outline-level="1">8. Code</text:h>
      <text:h text:style-name="Heading3" text:outline-level="3">Simple Definition</text:h>
      <text:p text:style-name="Textbody">Code is a collection of instructions<text:s/>written for a computer.</text:p>
      <text:h text:style-name="Heading3" text:outline-level="3">Boda Boda Analogy</text:h>
      <text:p text:style-name="Textbody">A full list of instructions for a rider:</text:p>
      <text:list text:style-name="LFO8" text:continue-numbering="true">
        <text:list-item>
          <text:p text:style-name="P32">Start bike</text:p>
        </text:list-item>
        <text:list-item>
          <text:p text:style-name="P33">Go to town</text:p>
        </text:list-item>
        <text:list-item>
          <text:p text:style-name="P34">Pick passenger</text:p>
        </text:list-item>
        <text:list-item>
          <text:p text:style-name="P35">Return</text:p>
        </text:list-item>
      </text:list>
      <text:p text:style-name="Textbody">The whole list is like code.</text:p>
      <text:h text:style-name="Heading3" text:outline-level="3">Computer Example</text:h>
      <text:p text:style-name="PreformattedText"><text:span text:style-name="SourceText">name = "Musab"</text:span></text:p>
      <text:p text:style-name="P36"><text:span text:style-name="SourceText">print(name)</text:span></text:p>
      <text:p text:style-name="Textbody">This is code.</text:p>
      <text:p text:style-name="HorizontalLine"/>
      <text:soft-page-break/>
      <text:h text:style-name="Heading1" text:outline-level="1">9. Block of Code</text:h>
      <text:h text:style-name="Heading3" text:outline-level="3">Simple Definition</text:h>
      <text:p text:style-name="Textbody">A block of code is a group of statements that belong together.</text:p>
      <text:h text:style-name="Heading3" text:outline-level="3">Boda Boda Analogy</text:h>
      <text:p text:style-name="Textbody">A passenger says:</text:p>
      <text:p text:style-name="PreformattedText"><text:span text:style-name="SourceText">Go to the market</text:span></text:p>
      <text:p text:style-name="PreformattedText"><text:span text:style-name="SourceText">Buy fuel</text:span></text:p>
      <text:p text:style-name="P37"><text:span text:style-name="SourceText">Come back</text:span></text:p>
      <text:p text:style-name="Textbody">These instructions form one task.</text:p>
      <text:h text:style-name="Heading3" text:outline-level="3">Computer Example</text:h>
      <text:p text:style-name="PreformattedText"><text:span text:style-name="SourceText">if fuel &gt; 0:</text:span></text:p>
      <text:p text:style-name="PreformattedText"><text:span text:style-name="SourceText"><text:s text:c="4"/>start_bike()</text:span></text:p>
      <text:p text:style-name="P38"><text:span text:style-name="SourceText"><text:s text:c="4"/>ride()</text:span></text:p>
      <text:p text:style-name="Textbody">The indented lines form a block of<text:s/>code.</text:p>
      <text:p text:style-name="HorizontalLine"/>
      <text:h text:style-name="Heading1" text:outline-level="1">10. Data Type</text:h>
      <text:h text:style-name="Heading3" text:outline-level="3">Simple Definition</text:h>
      <text:p text:style-name="Textbody">A data type tells the computer what kind of data is being stored.</text:p>
      <text:h text:style-name="Heading3" text:outline-level="3">Boda Boda Analogy</text:h>
      <text:p text:style-name="Textbody">Different things can be carried:</text:p>
      <text:list text:style-name="LFO9" text:continue-numbering="true">
        <text:list-item>
          <text:p text:style-name="P39">Passenger</text:p>
        </text:list-item>
        <text:list-item>
          <text:p text:style-name="P40">Fuel</text:p>
        </text:list-item>
        <text:list-item>
          <text:p text:style-name="P41">Money</text:p>
        </text:list-item>
        <text:list-item>
          <text:p text:style-name="P42">Parcel</text:p>
        </text:list-item>
      </text:list>
      <text:p text:style-name="Textbody">Each is a different type.</text:p>
      <text:h text:style-name="Heading3" text:outline-level="3">Computer Example</text:h>
      <text:p text:style-name="PreformattedText"><text:span text:style-name="SourceText">name = "Musab" <text:s text:c="5"/># Text</text:span></text:p>
      <text:p text:style-name="PreformattedText"><text:span text:style-name="SourceText">ag</text:span><text:span text:style-name="SourceText">e = 20 <text:s text:c="11"/># Number</text:span></text:p>
      <text:p text:style-name="P43"><text:span text:style-name="SourceText">fuel = 5.5 <text:s text:c="9"/># Decimal</text:span></text:p>
      <text:p text:style-name="Textbody">Different values have different data types.</text:p>
      <text:p text:style-name="HorizontalLine"/>
      <text:soft-page-break/>
      <text:h text:style-name="Heading1" text:outline-level="1">11. Declaring</text:h>
      <text:h text:style-name="Heading3" text:outline-level="3">Simple Definition</text:h>
      <text:p text:style-name="Textbody">Declaring means creating or introducing a variable to the computer.</text:p>
      <text:h text:style-name="Heading3" text:outline-level="3">Boda Boda Analogy</text:h>
      <text:p text:style-name="Textbody">You place an empty fuel jerrycan and<text:s/>label it:</text:p>
      <text:p text:style-name="P44"><text:span text:style-name="SourceText">Fuel</text:span></text:p>
      <text:p text:style-name="Textbody">The container exists, but it may still be empty.</text:p>
      <text:h text:style-name="Heading3" text:outline-level="3">Computer Example</text:h>
      <text:p text:style-name="Textbody">In some languages:</text:p>
      <text:p text:style-name="P45"><text:span text:style-name="SourceText">int age;</text:span></text:p>
      <text:p text:style-name="Textbody">The variable exists but has no value yet.</text:p>
      <text:p text:style-name="HorizontalLine"/>
      <text:h text:style-name="Heading1" text:outline-level="1">12. Initialising</text:h>
      <text:h text:style-name="Heading3" text:outline-level="3">Simple Definition</text:h>
      <text:p text:style-name="Textbody">Initialising means giving the variable its first value.</text:p>
      <text:h text:style-name="Heading3" text:outline-level="3">Boda Boda Analogy</text:h>
      <text:p text:style-name="Textbody">After labeling the fuel container, you pour in 5 liters of petrol.</text:p>
      <text:p text:style-name="Textbody">Now it contains something.</text:p>
      <text:h text:style-name="Heading3" text:outline-level="3">Computer Example</text:h>
      <text:p text:style-name="P46"><text:span text:style-name="SourceText">int age = 20;</text:span></text:p>
      <text:p text:style-name="Textbody">The variable receives its first value.</text:p>
      <text:p text:style-name="HorizontalLine"/>
      <text:h text:style-name="Heading1" text:outline-level="1">Easy Summary Table</text:h>
      <table:table table:style-name="Table47">
        <table:table-columns>
          <table:table-column table:style-name="TableColumn48"/>
          <table:table-column table:style-name="TableColumn49"/>
        </table:table-columns>
        <table:table-header-rows>
          <table:table-row table:style-name="TableRow50">
            <table:table-cell table:style-name="TableCell51">
              <text:p text:style-name="TableHeading">Term</text:p>
            </table:table-cell>
            <table:table-cell table:style-name="TableCell52">
              <text:p text:style-name="TableHeading">Boda Boda Meaning</text:p>
            </table:table-cell>
          </table:table-row>
        </table:table-header-rows>
        <table:table-row table:style-name="TableRow53">
          <table:table-cell table:style-name="TableCell54">
            <text:p text:style-name="TableContents">Programming</text:p>
          </table:table-cell>
          <table:table-cell table:style-name="TableCell55">
            <text:p text:style-name="TableContents">Giving instructions to a rider</text:p>
          </table:table-cell>
        </table:table-row>
        <table:table-row table:style-name="TableRow56">
          <table:table-cell table:style-name="TableCell57">
            <text:p text:style-name="TableContents">CPU</text:p>
          </table:table-cell>
          <table:table-cell table:style-name="TableCell58">
            <text:p text:style-name="TableContents">Rider/brain</text:p>
          </table:table-cell>
        </table:table-row>
        <table:table-row table:style-name="TableRow59">
          <table:table-cell table:style-name="TableCell60">
            <text:p text:style-name="TableContents">RAM</text:p>
          </table:table-cell>
          <table:table-cell table:style-name="TableCell61">
            <text:p text:style-name="TableContents">Temporary space on the bike</text:p>
          </table:table-cell>
        </table:table-row>
        <table:table-row table:style-name="TableRow62">
          <table:table-cell table:style-name="TableCell63">
            <text:p text:style-name="TableContents">Hard Disk</text:p>
          </table:table-cell>
          <table:table-cell table:style-name="TableCell64">
            <text:p text:style-name="TableContents">Home/store where things are kept</text:p>
          </table:table-cell>
        </table:table-row>
        <table:table-row table:style-name="TableRow65">
          <table:table-cell table:style-name="TableCell66">
            <text:p text:style-name="TableContents">Memory Address</text:p>
          </table:table-cell>
          <table:table-cell table:style-name="TableCell67">
            <text:p text:style-name="TableContents">House address</text:p>
          </table:table-cell>
        </table:table-row>
        <table:table-row table:style-name="TableRow68">
          <table:table-cell table:style-name="TableCell69">
            <text:p text:style-name="TableContents">Memory Partitioning</text:p>
          </table:table-cell>
          <table:table-cell table:style-name="TableCell70">
            <text:p text:style-name="TableContents">Parking spaces divided into sections</text:p>
          </table:table-cell>
        </table:table-row>
        <table:table-row table:style-name="TableRow71">
          <table:table-cell table:style-name="TableCell72">
            <text:p text:style-name="TableContents">Variable</text:p>
          </table:table-cell>
          <table:table-cell table:style-name="TableCell73">
            <text:p text:style-name="TableContents">Labeled container</text:p>
          </table:table-cell>
        </table:table-row>
        <table:table-row table:style-name="TableRow74">
          <table:table-cell table:style-name="TableCell75">
            <text:p text:style-name="TableContents">Statement</text:p>
          </table:table-cell>
          <table:table-cell table:style-name="TableCell76">
            <text:p text:style-name="TableContents">One instruction</text:p>
          </table:table-cell>
        </table:table-row>
        <text:soft-page-break/>
        <table:table-row table:style-name="TableRow77">
          <table:table-cell table:style-name="TableCell78">
            <text:p text:style-name="TableContents">Module</text:p>
          </table:table-cell>
          <table:table-cell table:style-name="TableCell79">
            <text:p text:style-name="TableContents">Toolbox</text:p>
          </table:table-cell>
        </table:table-row>
        <table:table-row table:style-name="TableRow80">
          <table:table-cell table:style-name="TableCell81">
            <text:p text:style-name="TableContents">Code</text:p>
          </table:table-cell>
          <table:table-cell table:style-name="TableCell82">
            <text:p text:style-name="TableContents">Full list of instructions</text:p>
          </table:table-cell>
        </table:table-row>
        <table:table-row table:style-name="TableRow83">
          <table:table-cell table:style-name="TableCell84">
            <text:p text:style-name="TableContents">Block of Code</text:p>
          </table:table-cell>
          <table:table-cell table:style-name="TableCell85">
            <text:p text:style-name="TableContents">Group of related instructions</text:p>
          </table:table-cell>
        </table:table-row>
        <table:table-row table:style-name="TableRow86">
          <table:table-cell table:style-name="TableCell87">
            <text:p text:style-name="TableContents">Data Type</text:p>
          </table:table-cell>
          <table:table-cell table:style-name="TableCell88">
            <text:p text:style-name="TableContents">Type of thing being carried</text:p>
          </table:table-cell>
        </table:table-row>
        <table:table-row table:style-name="TableRow89">
          <table:table-cell table:style-name="TableCell90">
            <text:p text:style-name="TableContents">Declaring</text:p>
          </table:table-cell>
          <table:table-cell table:style-name="TableCell91">
            <text:p text:style-name="TableContents">Creating a labeled empty container</text:p>
          </table:table-cell>
        </table:table-row>
        <table:table-row table:style-name="TableRow92">
          <table:table-cell table:style-name="TableCell93">
            <text:p text:style-name="TableContents">Initialising</text:p>
          </table:table-cell>
          <table:table-cell table:style-name="TableCell94">
            <text:p text:style-name="TableContents">Putting the first item in the container</text:p>
          </table:table-cell>
        </table:table-row>
      </table:table>
      <text:p text:style-name="Textbody">A good way to remember it is:</text:p>
      <text:p text:style-name="Textbody"><text:span text:style-name="StrongEmphasis">Programming = Writing instructions → Code is made of statements → Statements use variables → Variables store data in RAM → RAM is managed using memory addresses and partitions → CPU processes the data → Hard Disk stores it permanently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rame Emmanuel Kitongo</meta:initial-creator>
    <dc:creator>User</dc:creator>
    <meta:creation-date>2026-06-29T06:23:00Z</meta:creation-date>
    <dc:date>2026-06-29T06:23:00Z</dc:date>
    <meta:template xlink:href="Normal" xlink:type="simple"/>
    <meta:editing-cycles>2</meta:editing-cycles>
    <meta:editing-duration>PT0S</meta:editing-duration>
    <meta:document-statistic meta:page-count="7" meta:paragraph-count="10" meta:word-count="758" meta:character-count="5069" meta:row-count="36" meta:non-whitespace-character-count="4321"/>
  </office:meta>
</office:document-meta>
</file>